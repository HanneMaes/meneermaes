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0000009C4000007A0AE48481D.jpg" manifest:media-type="image/jpeg"/>
  <manifest:file-entry manifest:full-path="Pictures/10000000000009C4000007A081049DBC.jpg" manifest:media-type="image/jpeg"/>
  <manifest:file-entry manifest:full-path="Pictures/10000000000009C4000007A020C00E8D.jpg" manifest:media-type="image/jpeg"/>
  <manifest:file-entry manifest:full-path="Pictures/10000000000009C4000007A0B24862A3.jpg" manifest:media-type="image/jpeg"/>
  <manifest:file-entry manifest:full-path="Pictures/1000000100000480000001978CAAF024.png" manifest:media-type="image/png"/>
  <manifest:file-entry manifest:full-path="content.xml" manifest:media-type="text/xml"/>
  <manifest:file-entry manifest:full-path="Fonts/Font_Poppins_1.ttf" manifest:media-type="application/x-font-ttf"/>
  <manifest:file-entry manifest:full-path="Fonts/Font_Poppins_2.ttf" manifest:media-type="application/x-font-ttf"/>
  <manifest:file-entry manifest:full-path="Fonts/Font_Poppins_3.ttf" manifest:media-type="application/x-font-ttf"/>
  <manifest:file-entry manifest:full-path="Fonts/Font_Poppins_4.ttf" manifest:media-type="application/x-font-ttf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oppins" svg:font-family="Poppins">
      <svg:font-face-src>
        <svg:font-face-uri xlink:href="Fonts/Font_Poppins_1.ttf" xlink:type="simple" loext:font-style="normal" loext:font-weight="normal">
          <svg:font-face-format svg:string="truetype"/>
        </svg:font-face-uri>
        <svg:font-face-uri xlink:href="Fonts/Font_Poppins_2.ttf" xlink:type="simple" loext:font-style="normal" loext:font-weight="bold">
          <svg:font-face-format svg:string="truetype"/>
        </svg:font-face-uri>
        <svg:font-face-uri xlink:href="Fonts/Font_Poppins_3.ttf" xlink:type="simple" loext:font-style="italic" loext:font-weight="normal">
          <svg:font-face-format svg:string="truetype"/>
        </svg:font-face-uri>
        <svg:font-face-uri xlink:href="Fonts/Font_Poppins_4.ttf" xlink:type="simple" loext:font-style="italic" loext:font-weight="bold">
          <svg:font-face-format svg:string="truetype"/>
        </svg:font-face-uri>
      </svg:font-face-src>
    </style:font-face>
    <style:font-face style:name="Poppins Medium" svg:font-family="'Poppins Medium'"/>
    <style:font-face style:name="Poppins SemiBold" svg:font-family="'Poppins SemiBold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el_20_en_20_object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en_20_object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el_20_en_20_object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el_20_en_20_objec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el_20_en_20_object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el_20_en_20_object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el_20_en_20_object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el_20_en_20_objec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el_20_en_20_object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el_20_en_20_object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el_20_en_20_object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el_20_en_20_objec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el_20_en_20_object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itel_20_en_20_object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itel_20_en_20_object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Titel_20_en_20_objec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itel_20_en_20_object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itel_20_en_20_object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itel_20_en_20_object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itel_20_en_20_objec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Titel_20_en_20_object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itel_20_en_20_object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Titel_20_en_20_object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Titel_20_en_20_objec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Titel_20_en_20_object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Titel_20_en_20_object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Titel_20_en_20_object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Titel_20_en_20_objec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lef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lef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90%" fo:text-align="left" fo:text-indent="0cm" loext:tab-stop-distance="0cm" style:writing-mode="lr-tb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P4" style:family="paragraph">
      <loext:graphic-properties draw:fill="none" draw:fill-color="#ffffff"/>
      <style:paragraph-properties fo:text-align="left" style:font-independent-line-spacing="true"/>
      <style:text-properties fo:font-size="40pt" fo:font-style="italic" style:font-style-asian="italic" style:font-style-complex="italic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left" fo:text-indent="-0.635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P6" style:family="paragraph">
      <style:paragraph-properties fo:margin-left="0cm" fo:margin-right="0cm" fo:margin-top="0cm" fo:margin-bottom="0cm" fo:line-height="9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Poppins SemiBold" fo:font-size="30pt" fo:letter-spacing="normal" fo:font-style="normal" style:text-underline-style="none" fo:font-weight="bold" fo:background-color="transparent" style:font-name-asian="Poppins SemiBold" style:font-size-asian="30pt" style:font-style-asian="normal" style:font-weight-asian="bold" style:font-name-complex="Poppins SemiBold" style:font-size-complex="30pt" style:font-style-complex="normal" style:font-weight-complex="bold">
        <loext:char-complex-color loext:theme-type="dark1" loext:color-type="theme"/>
      </style:text-properties>
    </style:style>
    <style:style style:name="P7" style:family="paragraph">
      <loext:graphic-properties draw:fill="none"/>
      <style:paragraph-properties fo:margin-left="0cm" fo:margin-right="0cm" fo:margin-top="0cm" fo:margin-bottom="0cm" fo:line-height="90%" fo:text-align="lef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Poppins SemiBold" fo:font-size="30pt" fo:letter-spacing="normal" fo:font-style="normal" style:text-underline-style="none" fo:font-weight="bold" fo:background-color="transparent" style:font-name-asian="Poppins SemiBold" style:font-size-asian="30pt" style:font-style-asian="normal" style:font-weight-asian="bold" style:font-name-complex="Poppins SemiBold" style:font-size-complex="30pt" style:font-style-complex="normal" style:font-weight-complex="bold">
        <loext:char-complex-color loext:theme-type="dark1" loext:color-type="theme"/>
      </style:text-properties>
    </style:style>
    <style:style style:name="P8" style:family="paragraph">
      <style:paragraph-properties fo:margin-left="0cm" fo:margin-right="0cm" fo:margin-top="0.42cm" fo:margin-bottom="0.35cm" fo:line-height="9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fo:font-size="10pt" fo:letter-spacing="normal" fo:font-style="normal" style:text-underline-style="none" fo:background-color="transparent" style:font-size-asian="10pt" style:font-style-asian="normal" style:font-size-complex="10pt" style:font-style-complex="normal">
        <loext:char-complex-color loext:theme-type="dark1" loext:color-type="theme"/>
      </style:text-properties>
    </style:style>
    <style:style style:name="P9" style:family="paragraph">
      <loext:graphic-properties draw:fill="none"/>
      <style:paragraph-properties fo:margin-left="0cm" fo:margin-right="0cm" fo:margin-top="0.339cm" fo:margin-bottom="0cm" fo:line-height="90%" fo:text-align="lef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Poppins" fo:font-size="20pt" fo:letter-spacing="normal" fo:font-style="normal" style:text-underline-style="none" fo:font-weight="normal" fo:background-color="transparent" style:font-name-asian="Poppins" style:font-size-asian="20pt" style:font-style-asian="normal" style:font-weight-asian="normal" style:font-name-complex="Poppins" style:font-size-complex="20pt" style:font-style-complex="normal" style:font-weight-complex="normal">
        <loext:char-complex-color loext:theme-type="dark1" loext:color-type="theme"/>
      </style:text-properties>
    </style:style>
    <style:style style:name="P10" style:family="paragraph">
      <style:paragraph-properties fo:margin-left="0cm" fo:margin-right="0cm" fo:margin-top="0cm" fo:margin-bottom="0cm" fo:line-height="90%" fo:text-align="left" fo:text-indent="0cm"/>
      <style:text-properties fo:font-variant="normal" fo:text-transform="none" fo:color="#86bd24" loext:opacity="100%" style:text-outline="false" style:text-line-through-style="none" style:text-line-through-type="none" style:text-position="0% 100%" style:font-name="Poppins SemiBold" fo:font-size="30pt" fo:letter-spacing="normal" fo:font-style="italic" style:text-underline-style="none" fo:font-weight="bold" fo:background-color="transparent" style:font-name-asian="Poppins SemiBold" style:font-size-asian="30pt" style:font-style-asian="italic" style:font-weight-asian="bold" style:font-name-complex="Poppins SemiBold" style:font-size-complex="30pt" style:font-style-complex="italic" style:font-weight-complex="bold"/>
    </style:style>
    <style:style style:name="P11" style:family="paragraph">
      <loext:graphic-properties draw:fill="none"/>
      <style:paragraph-properties fo:margin-left="0cm" fo:margin-right="0cm" fo:margin-top="0cm" fo:margin-bottom="0cm" fo:line-height="90%" fo:text-align="left" fo:text-indent="0cm" style:font-independent-line-spacing="true"/>
      <style:text-properties fo:font-variant="normal" fo:text-transform="none" fo:color="#86bd24" loext:opacity="100%" style:text-outline="false" style:text-line-through-style="none" style:text-line-through-type="none" style:text-position="0% 100%" style:font-name="Poppins SemiBold" fo:font-size="40pt" fo:letter-spacing="normal" fo:font-style="italic" style:text-underline-style="none" fo:font-weight="bold" fo:background-color="transparent" style:font-name-asian="Poppins SemiBold" style:font-size-asian="40pt" style:font-style-asian="italic" style:font-weight-asian="bold" style:font-name-complex="Poppins SemiBold" style:font-size-complex="40pt" style:font-style-complex="italic" style:font-weight-complex="bold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60pt" fo:letter-spacing="normal" fo:language="nl" fo:country="BE" fo:font-style="normal" style:text-underline-style="none" fo:font-weight="bold" fo:background-color="transparent" style:font-name-asian="Poppins" style:font-size-asian="60pt" style:font-style-asian="normal" style:font-weight-asian="bold" style:font-name-complex="Poppins" style:font-size-complex="60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" fo:font-size="40pt" fo:letter-spacing="normal" fo:language="nl" fo:country="BE" fo:font-style="italic" style:text-underline-style="none" fo:font-weight="normal" fo:background-color="transparent" style:font-name-asian="Poppins Medium" style:font-size-asian="40pt" style:font-style-asian="italic" style:font-weight-asian="normal" style:font-name-complex="Poppins Medium" style:font-size-complex="40pt" style:font-style-complex="italic" style:font-weight-complex="normal">
        <loext:char-complex-color loext:theme-type="light1" loext:color-type="theme"/>
      </style:text-properties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86bd24" loext:opacity="100%" fo:font-style="italic" fo:background-color="transparent" style:font-style-asian="italic" style:font-style-complex="italic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282cm" text:min-label-width="0.988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O&amp;L + OO&amp;S" draw:style-name="dp1" draw:master-page-name="TITLE" presentation:presentation-page-layout-name="AL1T0">
        <draw:frame draw:name="Google Shape;29;p1" presentation:style-name="pr1" draw:text-style-name="P2" draw:layer="layout" svg:width="18.932cm" svg:height="2.095cm" svg:x="1.195cm" svg:y="5.553cm" presentation:class="title" presentation:user-transformed="true">
          <draw:text-box>
            <text:p text:style-name="P1"><text:span text:style-name="T1">Naam</text:span></text:p>
          </draw:text-box>
        </draw:frame>
        <draw:frame draw:name="Google Shape;30;p1" presentation:style-name="pr2" draw:text-style-name="P4" draw:layer="layout" svg:width="18.298cm" svg:height="4.598cm" svg:x="1.195cm" svg:y="7.649cm" presentation:class="subtitle" presentation:user-transformed="true">
          <draw:text-box>
            <text:p text:style-name="P3"><text:span text:style-name="T2">Stage 5A&amp;D</text:span></text:p>
          </draw:text-box>
        </draw:frame>
        <presentation:notes draw:style-name="dp2">
          <draw:frame draw:name="Google Shape;26;p1:notes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7;p1:notes" draw:style-name="gr1" draw:layer="layout" svg:width="10.979cm" svg:height="8.572cm" svg:x="4.035cm" svg:y="3.175cm" draw:page-number="1" presentation:class="page"/>
        </presentation:notes>
      </draw:page>
      <draw:page draw:name="page2" draw:style-name="dp1" draw:master-page-name="Titel_20_en_20_object">
        <draw:frame draw:name="Google Shape;35;p2" presentation:style-name="pr4" draw:text-style-name="P7" draw:layer="layout" svg:width="18.848cm" svg:height="1.231cm" svg:x="3.208cm" svg:y="0.914cm" presentation:class="title" presentation:user-transformed="true">
          <draw:text-box>
            <text:p text:style-name="P6">Titel</text:p>
          </draw:text-box>
        </draw:frame>
        <draw:frame draw:name="Google Shape;36;p2" presentation:style-name="pr5" draw:text-style-name="P9" draw:layer="layout" svg:width="19.5cm" svg:height="12.157cm" svg:x="1.5cm" svg:y="5cm" presentation:class="outline" presentation:user-transformed="true">
          <draw:text-box>
            <text:p text:style-name="P8"><text:span text:style-name="T3">Lorem ipsum dolor sit amet, consectetur adipiscing elit. </text:span><text:span text:style-name="T3">Proin malesuada tempor mi sit amet cursus.</text:span></text:p>
          </draw:text-box>
        </draw:frame>
        <draw:frame draw:name="Google Shape;35;p 1" presentation:style-name="pr6" draw:text-style-name="P11" draw:layer="layout" svg:width="18.848cm" svg:height="1.231cm" svg:x="1.5cm" svg:y="3cm" presentation:class="title" presentation:user-transformed="true">
          <draw:text-box>
            <text:p text:style-name="P10"><text:span text:style-name="T4">Voorstelling klant</text:span></text:p>
          </draw:text-box>
        </draw:frame>
        <presentation:notes draw:style-name="dp2">
          <draw:frame draw:name="Google Shape;32;p2:notes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3;p2:notes" draw:style-name="gr1" draw:layer="layout" svg:width="10.979cm" svg:height="8.572cm" svg:x="4.035cm" svg:y="3.175cm" draw:page-number="2" presentation:class="page"/>
        </presentation:notes>
      </draw:page>
      <draw:page draw:name="page3" draw:style-name="dp1" draw:master-page-name="Titel_20_en_20_object">
        <draw:frame draw:name="Google Shape;35;p 2" presentation:style-name="pr8" draw:text-style-name="P7" draw:layer="layout" svg:width="18.848cm" svg:height="1.231cm" svg:x="3.208cm" svg:y="0.914cm" presentation:class="title" presentation:user-transformed="true">
          <draw:text-box>
            <text:p text:style-name="P6">Titel</text:p>
          </draw:text-box>
        </draw:frame>
        <draw:frame draw:name="Google Shape;36;p 1" presentation:style-name="pr9" draw:text-style-name="P9" draw:layer="layout" svg:width="19.5cm" svg:height="12.157cm" svg:x="1.5cm" svg:y="5cm" presentation:class="outline" presentation:user-transformed="true">
          <draw:text-box>
            <text:p text:style-name="P8"><text:span text:style-name="T3">Lorem ipsum dolor sit amet, consectetur adipiscing elit. Proin </text:span><text:span text:style-name="T3">malesuada tempor mi sit amet cursus.</text:span></text:p>
          </draw:text-box>
        </draw:frame>
        <draw:frame draw:name="Google Shape;35;p 3" presentation:style-name="pr10" draw:text-style-name="P11" draw:layer="layout" svg:width="18.848cm" svg:height="1.231cm" svg:x="1.5cm" svg:y="3cm" presentation:class="title" presentation:user-transformed="true">
          <draw:text-box>
            <text:p text:style-name="P10"><text:span text:style-name="T4">Doel van de website</text:span></text:p>
          </draw:text-box>
        </draw:frame>
        <presentation:notes draw:style-name="dp1">
          <draw:frame draw:name="Google Shape;32;p2:notes 1" presentation:style-name="pr1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3;p2:notes 1" draw:style-name="gr1" draw:layer="layout" svg:width="10.979cm" svg:height="8.572cm" svg:x="4.035cm" svg:y="3.175cm" draw:page-number="3" presentation:class="page"/>
        </presentation:notes>
      </draw:page>
      <draw:page draw:name="page4" draw:style-name="dp1" draw:master-page-name="Titel_20_en_20_object">
        <draw:frame draw:name="Google Shape;35;p 4" presentation:style-name="pr12" draw:text-style-name="P7" draw:layer="layout" svg:width="18.848cm" svg:height="1.231cm" svg:x="3.208cm" svg:y="0.914cm" presentation:class="title" presentation:user-transformed="true">
          <draw:text-box>
            <text:p text:style-name="P6">Titel</text:p>
          </draw:text-box>
        </draw:frame>
        <draw:frame draw:name="Google Shape;36;p 2" presentation:style-name="pr13" draw:text-style-name="P9" draw:layer="layout" svg:width="19.5cm" svg:height="12.157cm" svg:x="1.5cm" svg:y="5cm" presentation:class="outline" presentation:user-transformed="true">
          <draw:text-box>
            <text:p text:style-name="P8"><text:span text:style-name="T3">Lorem ipsum dolor sit amet, consectetur adipiscing elit. Proin malesuada tempor mi sit amet cursus.</text:span></text:p>
          </draw:text-box>
        </draw:frame>
        <draw:frame draw:name="Google Shape;35;p 5" presentation:style-name="pr14" draw:text-style-name="P11" draw:layer="layout" svg:width="18.848cm" svg:height="1.231cm" svg:x="1.5cm" svg:y="3cm" presentation:class="title" presentation:user-transformed="true">
          <draw:text-box>
            <text:p text:style-name="P10"><text:span text:style-name="T4">Technologieën &amp; technieken</text:span></text:p>
          </draw:text-box>
        </draw:frame>
        <presentation:notes draw:style-name="dp1">
          <draw:frame draw:name="Google Shape;32;p2:notes 2" presentation:style-name="pr1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3;p2:notes 2" draw:style-name="gr1" draw:layer="layout" svg:width="10.979cm" svg:height="8.572cm" svg:x="4.035cm" svg:y="3.175cm" draw:page-number="4" presentation:class="page"/>
        </presentation:notes>
      </draw:page>
      <draw:page draw:name="page5" draw:style-name="dp1" draw:master-page-name="Titel_20_en_20_object">
        <draw:frame draw:name="Google Shape;35;p 6" presentation:style-name="pr16" draw:text-style-name="P7" draw:layer="layout" svg:width="18.848cm" svg:height="1.231cm" svg:x="3.208cm" svg:y="0.914cm" presentation:class="title" presentation:user-transformed="true">
          <draw:text-box>
            <text:p text:style-name="P6">Titel</text:p>
          </draw:text-box>
        </draw:frame>
        <draw:frame draw:name="Google Shape;36;p 3" presentation:style-name="pr17" draw:text-style-name="P9" draw:layer="layout" svg:width="19.5cm" svg:height="12.157cm" svg:x="1.5cm" svg:y="5cm" presentation:class="outline" presentation:user-transformed="true">
          <draw:text-box>
            <text:p text:style-name="P8"><text:span text:style-name="T3">Lorem ipsum dolor sit amet, consectetur adipiscing elit. Proin malesuada tempor mi sit amet cursus.</text:span></text:p>
          </draw:text-box>
        </draw:frame>
        <draw:frame draw:name="Google Shape;35;p 7" presentation:style-name="pr18" draw:text-style-name="P11" draw:layer="layout" svg:width="18.848cm" svg:height="1.231cm" svg:x="1.5cm" svg:y="3cm" presentation:class="title" presentation:user-transformed="true">
          <draw:text-box>
            <text:p text:style-name="P10"><text:span text:style-name="T4">Gemaakte keuzes</text:span></text:p>
          </draw:text-box>
        </draw:frame>
        <presentation:notes draw:style-name="dp1">
          <draw:frame draw:name="Google Shape;32;p2:notes 3" presentation:style-name="pr1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3;p2:notes 3" draw:style-name="gr1" draw:layer="layout" svg:width="10.979cm" svg:height="8.572cm" svg:x="4.035cm" svg:y="3.175cm" draw:page-number="5" presentation:class="page"/>
        </presentation:notes>
      </draw:page>
      <draw:page draw:name="page6" draw:style-name="dp1" draw:master-page-name="Titel_20_en_20_object">
        <draw:frame draw:name="Google Shape;35;p 8" presentation:style-name="pr20" draw:text-style-name="P7" draw:layer="layout" svg:width="18.848cm" svg:height="1.231cm" svg:x="3.208cm" svg:y="0.914cm" presentation:class="title" presentation:user-transformed="true">
          <draw:text-box>
            <text:p text:style-name="P6">Titel</text:p>
          </draw:text-box>
        </draw:frame>
        <draw:frame draw:name="Google Shape;36;p 4" presentation:style-name="pr21" draw:text-style-name="P9" draw:layer="layout" svg:width="19.5cm" svg:height="12.157cm" svg:x="1.5cm" svg:y="5cm" presentation:class="outline" presentation:user-transformed="true">
          <draw:text-box>
            <text:p text:style-name="P8"><text:span text:style-name="T3">Lorem ipsum dolor sit amet, consectetur adipiscing elit. Proin malesuada tempor mi sit amet cursus.</text:span></text:p>
          </draw:text-box>
        </draw:frame>
        <draw:frame draw:name="Google Shape;35;p 9" presentation:style-name="pr22" draw:text-style-name="P11" draw:layer="layout" svg:width="18.848cm" svg:height="1.231cm" svg:x="1.5cm" svg:y="3cm" presentation:class="title" presentation:user-transformed="true">
          <draw:text-box>
            <text:p text:style-name="P10"><text:span text:style-name="T4">Handleiding &amp; demonstratie</text:span></text:p>
          </draw:text-box>
        </draw:frame>
        <presentation:notes draw:style-name="dp1">
          <draw:frame draw:name="Google Shape;32;p2:notes 4" presentation:style-name="pr2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3;p2:notes 4" draw:style-name="gr1" draw:layer="layout" svg:width="10.979cm" svg:height="8.572cm" svg:x="4.035cm" svg:y="3.175cm" draw:page-number="6" presentation:class="page"/>
        </presentation:notes>
      </draw:page>
      <draw:page draw:name="page7" draw:style-name="dp1" draw:master-page-name="Titel_20_en_20_object">
        <draw:frame draw:name="Google Shape;35;p 10" presentation:style-name="pr24" draw:text-style-name="P7" draw:layer="layout" svg:width="18.848cm" svg:height="1.231cm" svg:x="3.208cm" svg:y="0.914cm" presentation:class="title" presentation:user-transformed="true">
          <draw:text-box>
            <text:p text:style-name="P6">Titel</text:p>
          </draw:text-box>
        </draw:frame>
        <draw:frame draw:name="Google Shape;36;p 5" presentation:style-name="pr25" draw:text-style-name="P9" draw:layer="layout" svg:width="19.5cm" svg:height="12.157cm" svg:x="1.5cm" svg:y="5cm" presentation:class="outline" presentation:user-transformed="true">
          <draw:text-box>
            <text:p text:style-name="P8"><text:span text:style-name="T3">Lorem ipsum dolor sit amet, consectetur adipiscing elit. Proin malesuada tempor mi sit amet cursus.</text:span></text:p>
          </draw:text-box>
        </draw:frame>
        <draw:frame draw:name="Google Shape;35;p 11" presentation:style-name="pr26" draw:text-style-name="P11" draw:layer="layout" svg:width="18.848cm" svg:height="1.231cm" svg:x="1.5cm" svg:y="3cm" presentation:class="title" presentation:user-transformed="true">
          <draw:text-box>
            <text:p text:style-name="P10"><text:span text:style-name="T4">Reflectie</text:span></text:p>
          </draw:text-box>
        </draw:frame>
        <presentation:notes draw:style-name="dp1">
          <draw:frame draw:name="Google Shape;32;p2:notes 5" presentation:style-name="pr2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3;p2:notes 5" draw:style-name="gr1" draw:layer="layout" svg:width="10.979cm" svg:height="8.572cm" svg:x="4.035cm" svg:y="3.175cm" draw:page-number="7" presentation:class="page"/>
        </presentation:notes>
      </draw:page>
      <draw:page draw:name="page8" draw:style-name="dp1" draw:master-page-name="Titel_20_en_20_object">
        <draw:frame draw:name="Google Shape;35;p 12" presentation:style-name="pr28" draw:text-style-name="P7" draw:layer="layout" svg:width="18.848cm" svg:height="1.231cm" svg:x="3.208cm" svg:y="0.914cm" presentation:class="title" presentation:user-transformed="true">
          <draw:text-box>
            <text:p text:style-name="P6">Titel</text:p>
          </draw:text-box>
        </draw:frame>
        <draw:frame draw:name="Google Shape;36;p 6" presentation:style-name="pr29" draw:text-style-name="P9" draw:layer="layout" svg:width="19.5cm" svg:height="12.157cm" svg:x="1.5cm" svg:y="5cm" presentation:class="outline" presentation:user-transformed="true">
          <draw:text-box>
            <text:p text:style-name="P8"><text:span text:style-name="T3">Lorem ipsum dolor sit amet, consectetur adipiscing elit. Proin malesuada tempor mi sit amet cursus.</text:span></text:p>
          </draw:text-box>
        </draw:frame>
        <draw:frame draw:name="Google Shape;35;p 13" presentation:style-name="pr30" draw:text-style-name="P11" draw:layer="layout" svg:width="18.848cm" svg:height="1.231cm" svg:x="1.5cm" svg:y="3cm" presentation:class="title" presentation:user-transformed="true">
          <draw:text-box>
            <text:p text:style-name="P10"><text:span text:style-name="T4">Dankwoord</text:span></text:p>
          </draw:text-box>
        </draw:frame>
        <presentation:notes draw:style-name="dp1">
          <draw:frame draw:name="Google Shape;32;p2:notes 6" presentation:style-name="pr3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3;p2:notes 6" draw:style-name="gr1" draw:layer="layout" svg:width="10.979cm" svg:height="8.572cm" svg:x="4.035cm" svg:y="3.175cm" draw:page-number="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oppins" svg:font-family="Poppins"/>
    <style:font-face style:name="Poppins Medium" svg:font-family="'Poppins Medium'"/>
    <style:font-face style:name="Poppins SemiBold" svg:font-family="'Poppins SemiBold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Geel_20_gevuld" draw:display-name="Geel gevuld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evul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Groen_20_gevuld" draw:display-name="Groen gevul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Rood_20_gevuld" draw:display-name="Rood gevul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9C4000007A081049DBC.jpg" xlink:type="simple" xlink:show="embed" xlink:actuate="onLoad"/>
    <draw:fill-image draw:name="msFillBitmap_20_2" draw:display-name="msFillBitmap 2" xlink:href="Pictures/10000000000009C4000007A020C00E8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el_20_en_20_object-background" style:display-name="Titel en objec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false" style:shrink-to-fit="true" style:writing-mode="lr-tb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el_20_en_20_object-outline2" style:display-name="Titel en object-outline2" style:family="presentation" style:parent-style-name="Titel_20_en_20_object-outline1">
      <style:graphic-properties style:writing-mode="lr-tb"/>
      <style:paragraph-properties fo:margin-left="0cm" fo:margin-right="0cm" fo:margin-top="0.4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el_20_en_20_object-outline3" style:display-name="Titel en object-outline3" style:family="presentation" style:parent-style-name="Titel_20_en_20_object-outline2">
      <style:graphic-properties style:writing-mode="lr-tb"/>
      <style:paragraph-properties fo:margin-left="0cm" fo:margin-right="0cm" fo:margin-top="0.3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el_20_en_20_object-outline4" style:display-name="Titel en object-outline4" style:family="presentation" style:parent-style-name="Titel_20_en_20_object-outline3">
      <style:graphic-properties style:writing-mode="lr-tb"/>
      <style:paragraph-properties fo:margin-left="0cm" fo:margin-right="0cm" fo:margin-top="0.2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el_20_en_20_object-outline5" style:display-name="Titel en object-outline5" style:family="presentation" style:parent-style-name="Titel_20_en_20_object-outline4">
      <style:paragraph-properties fo:margin-top="0.1cm" fo:margin-bottom="0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top="0.1cm" fo:margin-bottom="0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top="0.1cm" fo:margin-bottom="0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top="0.1cm" fo:margin-bottom="0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top="0.1cm" fo:margin-bottom="0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 style:writing-mode="lr-tb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1.543cm" svg:y="2.465cm" svg:width="17.934cm" svg:height="4.959cm"/>
      <presentation:placeholder presentation:object="subtitle" svg:x="1.543cm" svg:y="8.256cm" svg:width="17.934cm" svg:height="18.71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.399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cm" draw:fill="solid" draw:fill-color="#86bc25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Mgr5" style:family="graphic" style:parent-style-name="standard">
      <style:graphic-properties draw:stroke="none" svg:stroke-width="0cm" draw:fill="solid" draw:fill-color="#e63323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Mpr1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en_20_objec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el_20_en_20_objec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el_20_en_20_objec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left"/>
      <style:text-properties fo:font-size="18pt"/>
    </style:style>
    <style:style style:name="MP6" style:family="paragraph">
      <loext:graphic-properties draw:fill="solid" draw:fill-color="#86bc25"/>
      <style:paragraph-properties fo:text-align="center" style:font-independent-line-spacing="true"/>
      <style:text-properties fo:font-size="14pt"/>
    </style:style>
    <style:style style:name="MP7" style:family="paragraph">
      <loext:graphic-properties draw:fill="none" draw:fill-color="#ffffff"/>
      <style:paragraph-properties fo:text-align="lef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" fo:font-size="40pt" fo:letter-spacing="normal" fo:font-style="normal" style:text-underline-style="none" fo:font-weight="normal" fo:background-color="transparent" style:font-name-asian="Poppins Medium" style:font-size-asian="40pt" style:font-style-asian="normal" style:font-weight-asian="normal" style:font-name-complex="Poppins Medium" style:font-size-complex="40pt" style:font-style-complex="normal" style:font-weight-complex="normal">
        <loext:char-complex-color loext:theme-type="light1" loext:color-type="theme"/>
      </style:text-properties>
    </style:style>
    <style:style style:name="MP8" style:family="paragraph">
      <style:paragraph-properties fo:text-align="left"/>
      <style:text-properties fo:font-size="20pt"/>
    </style:style>
    <style:style style:name="MP9" style:family="paragraph">
      <loext:graphic-properties draw:fill="none"/>
      <style:paragraph-properties fo:text-align="left" style:font-independent-line-spacing="true"/>
      <style:text-properties fo:font-size="20pt"/>
    </style:style>
    <style:style style:name="MP10" style:family="paragraph">
      <loext:graphic-properties draw:fill="solid" draw:fill-color="#e63323"/>
      <style:paragraph-properties fo:text-align="center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282cm" text:min-label-width="0.988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52cm" text:min-label-width="0.988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22cm" text:min-label-width="0.98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092cm" text:min-label-width="0.988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362cm" text:min-label-width="0.98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8cm" text:min-label-width="0.94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95cm" text:min-label-width="0.94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.22cm" text:min-label-width="0.94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49cm" text:min-label-width="0.94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mer&gt;</text:page-number></text:p>
        </draw:text-box>
      </draw:frame>
    </style:handout-master>
    <style:master-page style:name="TITLE" style:page-layout-name="PM1" draw:style-name="Mdp1">
      <loext:theme loext:name="Kantoorthema">
        <loext:theme-colors loext:name="Kantoorthem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10;p3" draw:style-name="Mgr3" draw:text-style-name="MP5" draw:layer="backgroundobjects" svg:width="24.376cm" svg:height="19.049cm" svg:x="0.011cm" svg:y="0cm">
        <draw:image xlink:href="Pictures/10000000000009C4000007A0B24862A3.jpg" xlink:type="simple" xlink:show="embed" xlink:actuate="onLoad" draw:mime-type="image/jpeg">
          <text:p/>
        </draw:image>
      </draw:frame>
      <draw:custom-shape draw:name="Google Shape;11;p3" draw:style-name="Mgr4" draw:text-style-name="MP6" draw:layer="backgroundobjects" svg:width="13.725cm" svg:height="2.152cm" svg:x="1.215cm" svg:y="0.414cm">
        <text:p/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3" draw:style-name="Mgr3" draw:text-style-name="MP5" draw:layer="backgroundobjects" svg:width="8.49cm" svg:height="2.999cm" svg:x="0.966cm" svg:y="0cm">
        <draw:image xlink:href="Pictures/1000000100000480000001978CAAF024.png" xlink:type="simple" xlink:show="embed" xlink:actuate="onLoad" draw:mime-type="image/png">
          <text:p/>
        </draw:image>
      </draw:frame>
      <draw:frame draw:name="Google Shape;14;p4" presentation:style-name="TITLE-title" draw:layer="backgroundobjects" svg:width="18.932cm" svg:height="2.095cm" svg:x="1.195cm" svg:y="5.553cm" presentation:class="title" presentation:placeholder="true" presentation:user-transformed="true">
        <draw:text-box/>
      </draw:frame>
      <draw:frame draw:name="Google Shape;15;p4" presentation:style-name="Mpr1" draw:text-style-name="MP7" draw:layer="backgroundobjects" svg:width="18.298cm" svg:height="4.598cm" svg:x="1.195cm" svg:y="7.649cm" presentation:class="subtitle" presentation:user-transformed="true">
        <draw:text-box>
          <text:p/>
        </draw:text-box>
      </draw:frame>
      <draw:frame draw:name="Google Shape;16;p4" draw:style-name="Mgr3" draw:text-style-name="MP5" draw:layer="backgroundobjects" svg:width="24.376cm" svg:height="19.049cm" svg:x="0.011cm" svg:y="0cm">
        <draw:image xlink:href="Pictures/10000000000009C4000007A0AE48481D.jpg" xlink:type="simple" xlink:show="embed" xlink:actuate="onLoad" draw:mime-type="image/jpeg">
          <text:p/>
        </draw:image>
      </draw:frame>
      <draw:frame draw:name="Google Shape;17;p4" draw:style-name="Mgr3" draw:text-style-name="MP5" draw:layer="backgroundobjects" svg:width="24.376cm" svg:height="19.049cm" svg:x="0.011cm" svg:y="0cm">
        <draw:image xlink:href="Pictures/10000000000009C4000007A0B24862A3.jpg" xlink:type="simple" xlink:show="embed" xlink:actuate="onLoad" draw:mime-type="image/jpeg">
          <text:p/>
        </draw:image>
      </draw:frame>
      <draw:custom-shape draw:name="Google Shape;18;p4" draw:style-name="Mgr4" draw:text-style-name="MP6" draw:layer="backgroundobjects" svg:width="13.725cm" svg:height="2.152cm" svg:x="1.215cm" svg:y="0.414cm">
        <text:p/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9;p4" draw:style-name="Mgr3" draw:text-style-name="MP5" draw:layer="backgroundobjects" svg:width="8.49cm" svg:height="2.999cm" svg:x="0.966cm" svg:y="0cm">
        <draw:image xlink:href="Pictures/1000000100000480000001978CAAF024.png" xlink:type="simple" xlink:show="embed" xlink:actuate="onLoad" draw:mime-type="image/png">
          <text:p/>
        </draw:image>
      </draw:frame>
      <draw:frame presentation:style-name="TITLE-outline1" draw:layer="backgroundobjects" svg:width="21.958cm" svg:height="11.048cm" svg:x="1.219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mer&gt;</text:page-number></text:p>
          </draw:text-box>
        </draw:frame>
      </presentation:notes>
    </style:master-page>
    <style:master-page style:name="Titel_20_en_20_object" style:display-name="Titel en object" style:page-layout-name="PM1" draw:style-name="Mdp2">
      <loext:theme loext:name="Kantoorthema">
        <loext:theme-colors loext:name="Kantoorthem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10;p3" draw:style-name="Mgr3" draw:text-style-name="MP5" draw:layer="backgroundobjects" svg:width="24.376cm" svg:height="19.049cm" svg:x="0.011cm" svg:y="0cm">
        <draw:image xlink:href="Pictures/10000000000009C4000007A0B24862A3.jpg" xlink:type="simple" xlink:show="embed" xlink:actuate="onLoad" draw:mime-type="image/jpeg">
          <text:p/>
        </draw:image>
      </draw:frame>
      <draw:custom-shape draw:name="Google Shape;11;p3" draw:style-name="Mgr4" draw:text-style-name="MP6" draw:layer="backgroundobjects" svg:width="13.725cm" svg:height="2.152cm" svg:x="1.215cm" svg:y="0.414cm">
        <text:p/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3" draw:style-name="Mgr3" draw:text-style-name="MP5" draw:layer="backgroundobjects" svg:width="8.49cm" svg:height="2.999cm" svg:x="0.966cm" svg:y="0cm">
        <draw:image xlink:href="Pictures/1000000100000480000001978CAAF024.png" xlink:type="simple" xlink:show="embed" xlink:actuate="onLoad" draw:mime-type="image/png">
          <text:p/>
        </draw:image>
      </draw:frame>
      <draw:frame draw:name="Google Shape;21;p5" presentation:style-name="Titel_20_en_20_object-title" draw:layer="backgroundobjects" svg:width="18.848cm" svg:height="1.231cm" svg:x="3.208cm" svg:y="1.014cm" presentation:class="title" presentation:placeholder="true" presentation:user-transformed="true">
        <draw:text-box/>
      </draw:frame>
      <draw:frame draw:name="Google Shape;22;p5" presentation:style-name="Mpr4" draw:text-style-name="MP9" draw:layer="backgroundobjects" svg:width="18.848cm" svg:height="13.842cm" svg:x="3.208cm" svg:y="3.315cm" presentation:class="outline" presentation:user-transformed="true">
        <draw:text-box>
          <text:list text:style-name="ML4">
            <text:list-item>
              <text:p text:style-name="MP8">Klik om de opmaak van de overzichtstekst te bewerken</text:p>
              <text:list>
                <text:list-item>
                  <text:p text:style-name="MP8">Tweede overzichtsniveau</text:p>
                  <text:list>
                    <text:list-item>
                      <text:p text:style-name="MP8">Derde overzichtsniveau</text:p>
                      <text:list>
                        <text:list-item>
                          <text:p text:style-name="MP8">Vierde overzichtsniveau</text:p>
                          <text:list>
                            <text:list-item>
                              <text:p text:style-name="MP8">Vijfde overzichtsniveau</text:p>
                              <text:list>
                                <text:list-item>
                                  <text:p text:style-name="MP8">Zesde overzichtsniveau</text:p>
                                  <text:list>
                                    <text:list-item>
                                      <text:p text:style-name="MP8">Zevende overzichtsniveau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23;p5" draw:style-name="Mgr3" draw:text-style-name="MP5" draw:layer="backgroundobjects" svg:width="24.376cm" svg:height="19.049cm" svg:x="0cm" svg:y="-0.006cm">
        <draw:image xlink:href="Pictures/10000000000009C4000007A0AE48481D.jpg" xlink:type="simple" xlink:show="embed" xlink:actuate="onLoad" draw:mime-type="image/jpeg">
          <text:p/>
        </draw:image>
      </draw:frame>
      <draw:custom-shape draw:name="Google Shape;24;p5" draw:style-name="Mgr5" draw:text-style-name="MP10" draw:layer="backgroundobjects" svg:width="0.749cm" svg:height="6.199cm" svg:x="21.279cm" svg:y="12.919cm">
        <text:p/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el_20_en_20_object-title" draw:layer="backgroundobjects" svg:width="0cm" svg:height="0cm" svg:x="0cm" svg:y="2.257cm" presentation:class="page"/>
        <draw:frame presentation:style-name="Titel_20_en_20_obj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2-01-10T15:09:35</meta:creation-date>
    <meta:initial-creator>joke doms</meta:initial-creator>
    <dc:date>2026-05-06T10:05:33.112636000</dc:date>
    <meta:editing-duration>PT10M42S</meta:editing-duration>
    <meta:editing-cycles>4</meta:editing-cycles>
    <meta:generator>LibreOffice/26.2.1.2$Windows_X86_64 LibreOffice_project/620$Build-2</meta:generator>
    <meta:document-statistic meta:object-count="78"/>
  </office:meta>
</office:document-meta>
</file>